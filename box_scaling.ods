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istic robot" table:style-name="ta1">
        <table:shapes>
          <draw:frame draw:z-index="0" draw:style-name="gr1" draw:text-style-name="P1" svg:width="6.2996in" svg:height="3.5382in" svg:x="1.963in" svg:y="3.2in">
            <draw:object draw:notify-on-update-of-ranges="'Logistic robot'.C3:'Logistic robot'.C7 'Logistic robot'.C1:'Logistic robot'.C1 'Logistic robot'.D3:'Logistic robot'.D7 'Logistic robot'.F3:'Logistic robot'.F7 'Logistic robot'.F1:'Logistic robot'.F1 'Logistic robot'.G3:'Logistic robot'.G7 'Logistic robot'.I1:'Logistic robot'.I1 'Logistic robot'.J3:'Logistic robot'.J7 'Logistic robot'.I3:'Logistic robot'.I7 'Logistic robot'.L1:'Logistic robot'.L1 'Logistic robot'.M3:'Logistic robot'.M7 'Logistic robot'.L3:'Logistic robot'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382in" svg:x="1.963in" svg:y="3.2in">
            <draw:object draw:notify-on-update-of-ranges="'Logistic robot'.C3:'Logistic robot'.C7 'Logistic robot'.C1:'Logistic robot'.C1 'Logistic robot'.D3:'Logistic robot'.D7 'Logistic robot'.F3:'Logistic robot'.F7 'Logistic robot'.F1:'Logistic robot'.F1 'Logistic robot'.G3:'Logistic robot'.G7 'Logistic robot'.I3:'Logistic robot'.I7 'Logistic robot'.I1:'Logistic robot'.I1 'Logistic robot'.J3:'Logistic robot'.J7 'Logistic robot'.L3:'Logistic robot'.L7 'Logistic robot'.L1:'Logistic robot'.L1 'Logistic robot'.M3:'Logistic robot'.M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cale factor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/>
          <table:table-cell table:number-columns-repeated="2" office:value-type="string" calcext:value-type="string">
            <text:p>Moved</text:p>
          </table:table-cell>
          <table:table-cell/>
          <table:table-cell table:number-columns-repeated="2" office:value-type="string" calcext:value-type="string">
            <text:p>Scaled</text:p>
          </table:table-cell>
          <table:table-cell/>
          <table:table-cell table:number-columns-repeated="2" office:value-type="string" calcext:value-type="string">
            <text:p>F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[.A11]*0.25" office:value-type="float" office:value="0.25" calcext:value-type="float">
            <text:p>0,2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-1.5" calcext:value-type="float">
            <text:p>-1,5</text:p>
          </table:table-cell>
          <table:table-cell/>
          <table:table-cell table:formula="of:=[.C3]-[.C11]" office:value-type="float" office:value="-0.5" calcext:value-type="float">
            <text:p>-0,5</text:p>
          </table:table-cell>
          <table:table-cell table:formula="of:=[.D3]-[.D11]" office:value-type="float" office:value="-1" calcext:value-type="float">
            <text:p>-1</text:p>
          </table:table-cell>
          <table:table-cell/>
          <table:table-cell table:formula="of:=[.F3]*[.A3]" office:value-type="float" office:value="-0.125" calcext:value-type="float">
            <text:p>-0,125</text:p>
          </table:table-cell>
          <table:table-cell table:formula="of:=[.G3]*[.A3]" office:value-type="float" office:value="-0.25" calcext:value-type="float">
            <text:p>-0,25</text:p>
          </table:table-cell>
          <table:table-cell/>
          <table:table-cell table:formula="of:=[.I3]+[.C11]" office:value-type="float" office:value="-0.125" calcext:value-type="float">
            <text:p>-0,125</text:p>
          </table:table-cell>
          <table:table-cell table:formula="of:=[.J3]+[.D11]" office:value-type="float" office:value="-0.75" calcext:value-type="float">
            <text:p>-0,75</text:p>
          </table:table-cell>
        </table:table-row>
        <table:table-row table:style-name="ro1">
          <table:table-cell table:formula="of:=[.A3]" office:value-type="float" office:value="0.25" calcext:value-type="float">
            <text:p>0,2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1.5" calcext:value-type="float">
            <text:p>-1,5</text:p>
          </table:table-cell>
          <table:table-cell/>
          <table:table-cell table:formula="of:=[.C4]-[.C12]" office:value-type="float" office:value="0.5" calcext:value-type="float">
            <text:p>0,5</text:p>
          </table:table-cell>
          <table:table-cell table:formula="of:=[.D4]-[.D12]" office:value-type="float" office:value="-1" calcext:value-type="float">
            <text:p>-1</text:p>
          </table:table-cell>
          <table:table-cell/>
          <table:table-cell table:formula="of:=[.F4]*[.A4]" office:value-type="float" office:value="0.125" calcext:value-type="float">
            <text:p>0,125</text:p>
          </table:table-cell>
          <table:table-cell table:formula="of:=[.G4]*[.A4]" office:value-type="float" office:value="-0.25" calcext:value-type="float">
            <text:p>-0,25</text:p>
          </table:table-cell>
          <table:table-cell/>
          <table:table-cell table:formula="of:=[.I4]+[.C12]" office:value-type="float" office:value="0.125" calcext:value-type="float">
            <text:p>0,125</text:p>
          </table:table-cell>
          <table:table-cell table:formula="of:=[.J4]+[.D12]" office:value-type="float" office:value="-0.75" calcext:value-type="float">
            <text:p>-0,75</text:p>
          </table:table-cell>
        </table:table-row>
        <table:table-row table:style-name="ro1">
          <table:table-cell table:formula="of:=[.A4]" office:value-type="float" office:value="0.25" calcext:value-type="float">
            <text:p>0,2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/>
          <table:table-cell table:formula="of:=[.C5]-[.C13]" office:value-type="float" office:value="0.5" calcext:value-type="float">
            <text:p>0,5</text:p>
          </table:table-cell>
          <table:table-cell table:formula="of:=[.D5]-[.D13]" office:value-type="float" office:value="1" calcext:value-type="float">
            <text:p>1</text:p>
          </table:table-cell>
          <table:table-cell/>
          <table:table-cell table:formula="of:=[.F5]*[.A5]" office:value-type="float" office:value="0.125" calcext:value-type="float">
            <text:p>0,125</text:p>
          </table:table-cell>
          <table:table-cell table:formula="of:=[.G5]*[.A5]" office:value-type="float" office:value="0.25" calcext:value-type="float">
            <text:p>0,25</text:p>
          </table:table-cell>
          <table:table-cell/>
          <table:table-cell table:formula="of:=[.I5]+[.C13]" office:value-type="float" office:value="0.125" calcext:value-type="float">
            <text:p>0,125</text:p>
          </table:table-cell>
          <table:table-cell table:formula="of:=[.J5]+[.D13]" office:value-type="float" office:value="-0.25" calcext:value-type="float">
            <text:p>-0,25</text:p>
          </table:table-cell>
        </table:table-row>
        <table:table-row table:style-name="ro1">
          <table:table-cell table:formula="of:=[.A5]" office:value-type="float" office:value="0.25" calcext:value-type="float">
            <text:p>0,2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6]-[.C14]" office:value-type="float" office:value="-0.5" calcext:value-type="float">
            <text:p>-0,5</text:p>
          </table:table-cell>
          <table:table-cell table:formula="of:=[.D6]-[.D14]" office:value-type="float" office:value="1" calcext:value-type="float">
            <text:p>1</text:p>
          </table:table-cell>
          <table:table-cell/>
          <table:table-cell table:formula="of:=[.F6]*[.A6]" office:value-type="float" office:value="-0.125" calcext:value-type="float">
            <text:p>-0,125</text:p>
          </table:table-cell>
          <table:table-cell table:formula="of:=[.G6]*[.A6]" office:value-type="float" office:value="0.25" calcext:value-type="float">
            <text:p>0,25</text:p>
          </table:table-cell>
          <table:table-cell/>
          <table:table-cell table:formula="of:=[.I6]+[.C14]" office:value-type="float" office:value="-0.125" calcext:value-type="float">
            <text:p>-0,125</text:p>
          </table:table-cell>
          <table:table-cell table:formula="of:=[.J6]+[.D14]" office:value-type="float" office:value="-0.25" calcext:value-type="float">
            <text:p>-0,25</text:p>
          </table:table-cell>
        </table:table-row>
        <table:table-row table:style-name="ro1">
          <table:table-cell table:formula="of:=[.A6]" office:value-type="float" office:value="0.25" calcext:value-type="float">
            <text:p>0,25</text:p>
          </table:table-cell>
          <table:table-cell/>
          <table:table-cell table:formula="of:=[.C3]" office:value-type="float" office:value="-0.5" calcext:value-type="float">
            <text:p>-0,5</text:p>
          </table:table-cell>
          <table:table-cell table:formula="of:=[.D3]" office:value-type="float" office:value="-1.5" calcext:value-type="float">
            <text:p>-1,5</text:p>
          </table:table-cell>
          <table:table-cell/>
          <table:table-cell table:formula="of:=[.C7]-[.C15]" office:value-type="float" office:value="-0.5" calcext:value-type="float">
            <text:p>-0,5</text:p>
          </table:table-cell>
          <table:table-cell table:formula="of:=[.D7]-[.D15]" office:value-type="float" office:value="-1" calcext:value-type="float">
            <text:p>-1</text:p>
          </table:table-cell>
          <table:table-cell/>
          <table:table-cell table:formula="of:=[.F7]*[.A7]" office:value-type="float" office:value="-0.125" calcext:value-type="float">
            <text:p>-0,125</text:p>
          </table:table-cell>
          <table:table-cell table:formula="of:=[.G7]*[.A7]" office:value-type="float" office:value="-0.25" calcext:value-type="float">
            <text:p>-0,25</text:p>
          </table:table-cell>
          <table:table-cell/>
          <table:table-cell table:formula="of:=[.I7]+[.C15]" office:value-type="float" office:value="-0.125" calcext:value-type="float">
            <text:p>-0,125</text:p>
          </table:table-cell>
          <table:table-cell table:formula="of:=[.J7]+[.D15]" office:value-type="float" office:value="-0.75" calcext:value-type="float">
            <text:p>-0,7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tomic scale factor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3]+([.C5]-[.C3])/2" office:value-type="float" office:value="0" calcext:value-type="float">
            <text:p>0</text:p>
          </table:table-cell>
          <table:table-cell table:formula="of:=[.D3]+([.D5]-[.D3])/2" office:value-type="float" office:value="-0.5" calcext:value-type="float">
            <text:p>-0,5</text:p>
          </table:table-cell>
          <table:table-cell table:formula="of:=IF([.A3]&gt;1;-1;1)" office:value-type="float" office:value="1" calcext:value-type="float">
            <text:p>1</text:p>
          </table:table-cell>
          <table:table-cell table:formula="of:=[.F3]+([.F5]-[.F3])/2" office:value-type="float" office:value="0" calcext:value-type="float">
            <text:p>0</text:p>
          </table:table-cell>
          <table:table-cell table:formula="of:=[.G3]+([.G5]-[.G3])/2" office:value-type="float" office:value="0" calcext:value-type="float">
            <text:p>0</text:p>
          </table:table-cell>
          <table:table-cell/>
          <table:table-cell table:formula="of:=[.I3]+([.I5]-[.I3])/2" office:value-type="float" office:value="0" calcext:value-type="float">
            <text:p>0</text:p>
          </table:table-cell>
          <table:table-cell table:formula="of:=[.J3]+([.J5]-[.J3])/2" office:value-type="float" office:value="0" calcext:value-type="float">
            <text:p>0</text:p>
          </table:table-cell>
          <table:table-cell table:formula="of:=[.E11]*-1" office:value-type="float" office:value="-1" calcext:value-type="float">
            <text:p>-1</text:p>
          </table:table-cell>
          <table:table-cell table:formula="of:=[.L3]+([.L5]-[.L3])/2" office:value-type="float" office:value="0" calcext:value-type="float">
            <text:p>0</text:p>
          </table:table-cell>
          <table:table-cell table:formula="of:=[.M3]+([.M5]-[.M3])/2" office:value-type="float" office:value="-0.5" calcext:value-type="float">
            <text:p>-0,5</text:p>
          </table:table-cell>
        </table:table-row>
        <table:table-row table:style-name="ro1">
          <table:table-cell table:number-columns-repeated="2"/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-0.5" calcext:value-type="float">
            <text:p>-0,5</text:p>
          </table:table-cell>
          <table:table-cell table:formula="of:=[.E11]" office:value-type="float" office:value="1" calcext:value-type="float">
            <text:p>1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/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float" office:value="-1" calcext:value-type="float">
            <text:p>-1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-0.5" calcext:value-type="float">
            <text:p>-0,5</text:p>
          </table:table-cell>
        </table:table-row>
        <table:table-row table:style-name="ro1">
          <table:table-cell table:number-columns-repeated="2"/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-0.5" calcext:value-type="float">
            <text:p>-0,5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/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float" office:value="-1" calcext:value-type="float">
            <text:p>-1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-0.5" calcext:value-type="float">
            <text:p>-0,5</text:p>
          </table:table-cell>
        </table:table-row>
        <table:table-row table:style-name="ro1">
          <table:table-cell table:number-columns-repeated="2"/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-0.5" calcext:value-type="float">
            <text:p>-0,5</text:p>
          </table:table-cell>
          <table:table-cell table:formula="of:=[.E13]" office:value-type="float" office:value="1" calcext:value-type="float">
            <text:p>1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/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-1" calcext:value-type="float">
            <text:p>-1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-0.5" calcext:value-type="float">
            <text:p>-0,5</text:p>
          </table:table-cell>
        </table:table-row>
        <table:table-row table:style-name="ro1">
          <table:table-cell table:number-columns-repeated="2"/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-0.5" calcext:value-type="float">
            <text:p>-0,5</text:p>
          </table:table-cell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/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0" calcext:value-type="float">
            <text:p>0</text:p>
          </table:table-cell>
          <table:table-cell table:formula="of:=[.K14]" office:value-type="float" office:value="-1" calcext:value-type="float">
            <text:p>-1</text:p>
          </table:table-cell>
          <table:table-cell table:formula="of:=[.L14]" office:value-type="float" office:value="0" calcext:value-type="float">
            <text:p>0</text:p>
          </table:table-cell>
          <table:table-cell table:formula="of:=[.M14]" office:value-type="float" office:value="-0.5" calcext:value-type="float">
            <text:p>-0,5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2"/>
          <table:table-cell table:formula="of:=[.M11]-[.M5]" office:value-type="float" office:value="-0.25" calcext:value-type="float">
            <text:p>-0,25</text:p>
          </table:table-cell>
        </table:table-row>
        <table:table-row table:style-name="ro1">
          <table:table-cell table:number-columns-repeated="12"/>
          <table:table-cell table:formula="of:=[.M12]-[.M3]" office:value-type="float" office:value="0.25" calcext:value-type="float">
            <text:p>0,25</text:p>
          </table:table-cell>
        </table:table-row>
      </table:table>
      <table:table table:name="Atomic construction bot" table:style-name="ta1">
        <table:shapes>
          <draw:frame draw:z-index="0" draw:style-name="gr1" draw:text-style-name="P1" svg:width="6.2996in" svg:height="3.5382in" svg:x="1.887in" svg:y="3.2449in">
            <draw:object draw:notify-on-update-of-ranges="'Atomic construction bot'.C3:'Atomic construction bot'.C7 'Atomic construction bot'.C1:'Atomic construction bot'.C1 'Atomic construction bot'.D3:'Atomic construction bot'.D7 'Atomic construction bot'.F3:'Atomic construction bot'.F7 'Atomic construction bot'.F1:'Atomic construction bot'.F1 'Atomic construction bot'.G3:'Atomic construction bot'.G7 'Atomic construction bot'.I3:'Atomic construction bot'.I7 'Atomic construction bot'.I1:'Atomic construction bot'.I1 'Atomic construction bot'.J3:'Atomic construction bot'.J7 'Atomic construction bot'.L3:'Atomic construction bot'.L7 'Atomic construction bot'.L1:'Atomic construction bot'.L1 'Atomic construction bot'.M3:'Atomic construction bot'.M7 'Atomic construction bot'.O1:'Atomic construction bot'.O1 'Atomic construction bot'.P3:'Atomic construction bot'.P7 'Atomic construction bot'.O3:'Atomic construction bot'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cale factor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/>
          <table:table-cell table:number-columns-repeated="2" office:value-type="string" calcext:value-type="string">
            <text:p>Moved</text:p>
          </table:table-cell>
          <table:table-cell/>
          <table:table-cell table:number-columns-repeated="2" office:value-type="string" calcext:value-type="string">
            <text:p>Scaled</text:p>
          </table:table-cell>
          <table:table-cell/>
          <table:table-cell table:number-columns-repeated="2" office:value-type="string" calcext:value-type="string">
            <text:p>Moved back</text:p>
          </table:table-cell>
          <table:table-cell/>
          <table:table-cell table:number-columns-repeated="2" office:value-type="string" calcext:value-type="string">
            <text:p>F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[.A11]*0.25" office:value-type="float" office:value="0.175" calcext:value-type="float">
            <text:p>0,17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-1.5" calcext:value-type="float">
            <text:p>-1,5</text:p>
          </table:table-cell>
          <table:table-cell/>
          <table:table-cell table:formula="of:=[.C3]-[.C11]" office:value-type="float" office:value="-0.5" calcext:value-type="float">
            <text:p>-0,5</text:p>
          </table:table-cell>
          <table:table-cell table:formula="of:=[.D3]-[.D11]" office:value-type="float" office:value="-0.5" calcext:value-type="float">
            <text:p>-0,5</text:p>
          </table:table-cell>
          <table:table-cell/>
          <table:table-cell table:formula="of:=[.F3]*[.A3]" office:value-type="float" office:value="-0.0875" calcext:value-type="float">
            <text:p>-0,0875</text:p>
          </table:table-cell>
          <table:table-cell table:formula="of:=[.G3]*[.A3]" office:value-type="float" office:value="-0.0875" calcext:value-type="float">
            <text:p>-0,0875</text:p>
          </table:table-cell>
          <table:table-cell/>
          <table:table-cell table:formula="of:=[.I3]+[.C11]" office:value-type="float" office:value="-0.0875" calcext:value-type="float">
            <text:p>-0,0875</text:p>
          </table:table-cell>
          <table:table-cell table:formula="of:=[.J3]+[.D11]" office:value-type="float" office:value="-1.0875" calcext:value-type="float">
            <text:p>-1,0875</text:p>
          </table:table-cell>
          <table:table-cell/>
          <table:table-cell table:formula="of:=[.L3]" office:value-type="float" office:value="-0.0875" calcext:value-type="float">
            <text:p>-0,0875</text:p>
          </table:table-cell>
          <table:table-cell table:formula="of:=[.M3]+[.N11]" office:value-type="float" office:value="-0.675" calcext:value-type="float">
            <text:p>-0,675</text:p>
          </table:table-cell>
        </table:table-row>
        <table:table-row table:style-name="ro1">
          <table:table-cell table:formula="of:=[.A3]" office:value-type="float" office:value="0.175" calcext:value-type="float">
            <text:p>0,17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1.5" calcext:value-type="float">
            <text:p>-1,5</text:p>
          </table:table-cell>
          <table:table-cell/>
          <table:table-cell table:formula="of:=[.C4]-[.C12]" office:value-type="float" office:value="0.5" calcext:value-type="float">
            <text:p>0,5</text:p>
          </table:table-cell>
          <table:table-cell table:formula="of:=[.D4]-[.D12]" office:value-type="float" office:value="-0.5" calcext:value-type="float">
            <text:p>-0,5</text:p>
          </table:table-cell>
          <table:table-cell/>
          <table:table-cell table:formula="of:=[.F4]*[.A4]" office:value-type="float" office:value="0.0875" calcext:value-type="float">
            <text:p>0,0875</text:p>
          </table:table-cell>
          <table:table-cell table:formula="of:=[.G4]*[.A4]" office:value-type="float" office:value="-0.0875" calcext:value-type="float">
            <text:p>-0,0875</text:p>
          </table:table-cell>
          <table:table-cell/>
          <table:table-cell table:formula="of:=[.I4]+[.C12]" office:value-type="float" office:value="0.0875" calcext:value-type="float">
            <text:p>0,0875</text:p>
          </table:table-cell>
          <table:table-cell table:formula="of:=[.J4]+[.D12]" office:value-type="float" office:value="-1.0875" calcext:value-type="float">
            <text:p>-1,0875</text:p>
          </table:table-cell>
          <table:table-cell/>
          <table:table-cell table:formula="of:=[.L4]" office:value-type="float" office:value="0.0875" calcext:value-type="float">
            <text:p>0,0875</text:p>
          </table:table-cell>
          <table:table-cell table:formula="of:=[.M4]+[.N12]" office:value-type="float" office:value="-0.675" calcext:value-type="float">
            <text:p>-0,675</text:p>
          </table:table-cell>
        </table:table-row>
        <table:table-row table:style-name="ro1">
          <table:table-cell table:formula="of:=[.A4]" office:value-type="float" office:value="0.175" calcext:value-type="float">
            <text:p>0,17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/>
          <table:table-cell table:formula="of:=[.C5]-[.C13]" office:value-type="float" office:value="0.5" calcext:value-type="float">
            <text:p>0,5</text:p>
          </table:table-cell>
          <table:table-cell table:formula="of:=[.D5]-[.D13]" office:value-type="float" office:value="0.5" calcext:value-type="float">
            <text:p>0,5</text:p>
          </table:table-cell>
          <table:table-cell/>
          <table:table-cell table:formula="of:=[.F5]*[.A5]" office:value-type="float" office:value="0.0875" calcext:value-type="float">
            <text:p>0,0875</text:p>
          </table:table-cell>
          <table:table-cell table:formula="of:=[.G5]*[.A5]" office:value-type="float" office:value="0.0875" calcext:value-type="float">
            <text:p>0,0875</text:p>
          </table:table-cell>
          <table:table-cell/>
          <table:table-cell table:formula="of:=[.I5]+[.C13]" office:value-type="float" office:value="0.0875" calcext:value-type="float">
            <text:p>0,0875</text:p>
          </table:table-cell>
          <table:table-cell table:formula="of:=[.J5]+[.D13]" office:value-type="float" office:value="-0.9125" calcext:value-type="float">
            <text:p>-0,9125</text:p>
          </table:table-cell>
          <table:table-cell/>
          <table:table-cell table:formula="of:=[.L5]" office:value-type="float" office:value="0.0875" calcext:value-type="float">
            <text:p>0,0875</text:p>
          </table:table-cell>
          <table:table-cell table:formula="of:=[.M5]+[.N13]" office:value-type="float" office:value="-0.5" calcext:value-type="float">
            <text:p>-0,5</text:p>
          </table:table-cell>
        </table:table-row>
        <table:table-row table:style-name="ro1">
          <table:table-cell table:formula="of:=[.A5]" office:value-type="float" office:value="0.175" calcext:value-type="float">
            <text:p>0,175</text:p>
          </table:table-cell>
          <table:table-cell/>
          <table:table-cell table:number-columns-repeated="2" office:value-type="float" office:value="-0.5" calcext:value-type="float">
            <text:p>-0,5</text:p>
          </table:table-cell>
          <table:table-cell/>
          <table:table-cell table:formula="of:=[.C6]-[.C14]" office:value-type="float" office:value="-0.5" calcext:value-type="float">
            <text:p>-0,5</text:p>
          </table:table-cell>
          <table:table-cell table:formula="of:=[.D6]-[.D14]" office:value-type="float" office:value="0.5" calcext:value-type="float">
            <text:p>0,5</text:p>
          </table:table-cell>
          <table:table-cell/>
          <table:table-cell table:formula="of:=[.F6]*[.A6]" office:value-type="float" office:value="-0.0875" calcext:value-type="float">
            <text:p>-0,0875</text:p>
          </table:table-cell>
          <table:table-cell table:formula="of:=[.G6]*[.A6]" office:value-type="float" office:value="0.0875" calcext:value-type="float">
            <text:p>0,0875</text:p>
          </table:table-cell>
          <table:table-cell/>
          <table:table-cell table:formula="of:=[.I6]+[.C14]" office:value-type="float" office:value="-0.0875" calcext:value-type="float">
            <text:p>-0,0875</text:p>
          </table:table-cell>
          <table:table-cell table:formula="of:=[.J6]+[.D14]" office:value-type="float" office:value="-0.9125" calcext:value-type="float">
            <text:p>-0,9125</text:p>
          </table:table-cell>
          <table:table-cell/>
          <table:table-cell table:formula="of:=[.L6]" office:value-type="float" office:value="-0.0875" calcext:value-type="float">
            <text:p>-0,0875</text:p>
          </table:table-cell>
          <table:table-cell table:formula="of:=[.M6]+[.N14]" office:value-type="float" office:value="-0.5" calcext:value-type="float">
            <text:p>-0,5</text:p>
          </table:table-cell>
        </table:table-row>
        <table:table-row table:style-name="ro1">
          <table:table-cell table:formula="of:=[.A6]" office:value-type="float" office:value="0.175" calcext:value-type="float">
            <text:p>0,175</text:p>
          </table:table-cell>
          <table:table-cell/>
          <table:table-cell table:formula="of:=[.C3]" office:value-type="float" office:value="-0.5" calcext:value-type="float">
            <text:p>-0,5</text:p>
          </table:table-cell>
          <table:table-cell table:formula="of:=[.D3]" office:value-type="float" office:value="-1.5" calcext:value-type="float">
            <text:p>-1,5</text:p>
          </table:table-cell>
          <table:table-cell/>
          <table:table-cell table:formula="of:=[.C7]-[.C15]" office:value-type="float" office:value="-0.5" calcext:value-type="float">
            <text:p>-0,5</text:p>
          </table:table-cell>
          <table:table-cell table:formula="of:=[.D7]-[.D15]" office:value-type="float" office:value="-0.5" calcext:value-type="float">
            <text:p>-0,5</text:p>
          </table:table-cell>
          <table:table-cell/>
          <table:table-cell table:formula="of:=[.F7]*[.A7]" office:value-type="float" office:value="-0.0875" calcext:value-type="float">
            <text:p>-0,0875</text:p>
          </table:table-cell>
          <table:table-cell table:formula="of:=[.G7]*[.A7]" office:value-type="float" office:value="-0.0875" calcext:value-type="float">
            <text:p>-0,0875</text:p>
          </table:table-cell>
          <table:table-cell/>
          <table:table-cell table:formula="of:=[.I7]+[.C15]" office:value-type="float" office:value="-0.0875" calcext:value-type="float">
            <text:p>-0,0875</text:p>
          </table:table-cell>
          <table:table-cell table:formula="of:=[.J7]+[.D15]" office:value-type="float" office:value="-1.0875" calcext:value-type="float">
            <text:p>-1,0875</text:p>
          </table:table-cell>
          <table:table-cell/>
          <table:table-cell table:formula="of:=[.L7]" office:value-type="float" office:value="-0.0875" calcext:value-type="float">
            <text:p>-0,0875</text:p>
          </table:table-cell>
          <table:table-cell table:formula="of:=[.M7]+[.N15]" office:value-type="float" office:value="-0.675" calcext:value-type="float">
            <text:p>-0,67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tomic scale factor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formula="of:=[.C3]+([.C5]-[.C3])/2" office:value-type="float" office:value="0" calcext:value-type="float">
            <text:p>0</text:p>
          </table:table-cell>
          <table:table-cell table:formula="of:=[.D3]+([.D5]-[.D3])/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F3]+([.F5]-[.F3])/2" office:value-type="float" office:value="0" calcext:value-type="float">
            <text:p>0</text:p>
          </table:table-cell>
          <table:table-cell table:formula="of:=[.G3]+([.G5]-[.G3])/2" office:value-type="float" office:value="0" calcext:value-type="float">
            <text:p>0</text:p>
          </table:table-cell>
          <table:table-cell/>
          <table:table-cell table:formula="of:=[.I3]+([.I5]-[.I3])/2" office:value-type="float" office:value="0" calcext:value-type="float">
            <text:p>0</text:p>
          </table:table-cell>
          <table:table-cell table:formula="of:=[.J3]+([.J5]-[.J3])/2" office:value-type="float" office:value="0" calcext:value-type="float">
            <text:p>0</text:p>
          </table:table-cell>
          <table:table-cell table:formula="of:=[.E11]*-1" office:value-type="float" office:value="1" calcext:value-type="float">
            <text:p>1</text:p>
          </table:table-cell>
          <table:table-cell table:formula="of:=[.L3]+([.L5]-[.L3])/2" office:value-type="float" office:value="0" calcext:value-type="float">
            <text:p>0</text:p>
          </table:table-cell>
          <table:table-cell table:formula="of:=[.M3]+([.M5]-[.M3])/2" office:value-type="float" office:value="-1" calcext:value-type="float">
            <text:p>-1</text:p>
          </table:table-cell>
          <table:table-cell table:formula="of:=COM.MICROSOFT.IFS([.M5]&lt;-0.5;-0.5 - [.M5];[.M5]&gt;-0.5;0.5 - [.M5];true;0)" office:value-type="float" office:value="0.4125" calcext:value-type="float">
            <text:p>0,4125</text:p>
          </table:table-cell>
          <table:table-cell table:formula="of:=[.O3]+([.O5]-[.O3])/2" office:value-type="float" office:value="0" calcext:value-type="float">
            <text:p>0</text:p>
          </table:table-cell>
          <table:table-cell table:formula="of:=[.P3]+([.P5]-[.P3])/2" office:value-type="float" office:value="-0.5875" calcext:value-type="float">
            <text:p>-0,5875</text:p>
          </table:table-cell>
        </table:table-row>
        <table:table-row table:style-name="ro1">
          <table:table-cell table:number-columns-repeated="2"/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-1" calcext:value-type="float">
            <text:p>-1</text:p>
          </table:table-cell>
          <table:table-cell table:formula="of:=[.E11]" office:value-type="float" office:value="-1" calcext:value-type="float">
            <text:p>-1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/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float" office:value="1" calcext:value-type="float">
            <text:p>1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-1" calcext:value-type="float">
            <text:p>-1</text:p>
          </table:table-cell>
          <table:table-cell table:formula="of:=[.N11]" office:value-type="float" office:value="0.4125" calcext:value-type="float">
            <text:p>0,4125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float" office:value="-0.5875" calcext:value-type="float">
            <text:p>-0,5875</text:p>
          </table:table-cell>
        </table:table-row>
        <table:table-row table:style-name="ro1">
          <table:table-cell table:number-columns-repeated="2"/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-1" calcext:value-type="float">
            <text:p>-1</text:p>
          </table:table-cell>
          <table:table-cell table:formula="of:=[.E12]" office:value-type="float" office:value="-1" calcext:value-type="float">
            <text:p>-1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/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float" office:value="1" calcext:value-type="float">
            <text:p>1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-1" calcext:value-type="float">
            <text:p>-1</text:p>
          </table:table-cell>
          <table:table-cell table:formula="of:=[.N12]" office:value-type="float" office:value="0.4125" calcext:value-type="float">
            <text:p>0,4125</text:p>
          </table:table-cell>
          <table:table-cell table:formula="of:=[.O12]" office:value-type="float" office:value="0" calcext:value-type="float">
            <text:p>0</text:p>
          </table:table-cell>
          <table:table-cell table:formula="of:=[.P12]" office:value-type="float" office:value="-0.5875" calcext:value-type="float">
            <text:p>-0,5875</text:p>
          </table:table-cell>
        </table:table-row>
        <table:table-row table:style-name="ro1">
          <table:table-cell table:number-columns-repeated="2"/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-1" calcext:value-type="float">
            <text:p>-1</text:p>
          </table:table-cell>
          <table:table-cell table:formula="of:=[.E13]" office:value-type="float" office:value="-1" calcext:value-type="float">
            <text:p>-1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/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-1" calcext:value-type="float">
            <text:p>-1</text:p>
          </table:table-cell>
          <table:table-cell table:formula="of:=[.N13]" office:value-type="float" office:value="0.4125" calcext:value-type="float">
            <text:p>0,4125</text:p>
          </table:table-cell>
          <table:table-cell table:formula="of:=[.O13]" office:value-type="float" office:value="0" calcext:value-type="float">
            <text:p>0</text:p>
          </table:table-cell>
          <table:table-cell table:formula="of:=[.P13]" office:value-type="float" office:value="-0.5875" calcext:value-type="float">
            <text:p>-0,5875</text:p>
          </table:table-cell>
        </table:table-row>
        <table:table-row table:style-name="ro1">
          <table:table-cell table:number-columns-repeated="2"/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-1" calcext:value-type="float">
            <text:p>-1</text:p>
          </table:table-cell>
          <table:table-cell table:formula="of:=[.E14]" office:value-type="float" office:value="-1" calcext:value-type="float">
            <text:p>-1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/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0" calcext:value-type="float">
            <text:p>0</text:p>
          </table:table-cell>
          <table:table-cell table:formula="of:=[.K14]" office:value-type="float" office:value="1" calcext:value-type="float">
            <text:p>1</text:p>
          </table:table-cell>
          <table:table-cell table:formula="of:=[.L14]" office:value-type="float" office:value="0" calcext:value-type="float">
            <text:p>0</text:p>
          </table:table-cell>
          <table:table-cell table:formula="of:=[.M14]" office:value-type="float" office:value="-1" calcext:value-type="float">
            <text:p>-1</text:p>
          </table:table-cell>
          <table:table-cell table:formula="of:=[.N14]" office:value-type="float" office:value="0.4125" calcext:value-type="float">
            <text:p>0,4125</text:p>
          </table:table-cell>
          <table:table-cell table:formula="of:=[.O14]" office:value-type="float" office:value="0" calcext:value-type="float">
            <text:p>0</text:p>
          </table:table-cell>
          <table:table-cell table:formula="of:=[.P14]" office:value-type="float" office:value="-0.5875" calcext:value-type="float">
            <text:p>-0,5875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2"/>
          <table:table-cell table:formula="of:=[.M11]-[.M5]" office:value-type="float" office:value="-0.0875" calcext:value-type="float">
            <text:p>-0,087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12]-[.M3]" office:value-type="float" office:value="0.0874999999999999" calcext:value-type="float">
            <text:p>0,0874999999999999</text:p>
          </table:table-cell>
          <table:table-cell table:number-columns-repeated="3"/>
        </table:table-row>
      </table:table>
      <table:table table:name="Companion drone" table:style-name="ta1">
        <table:shapes>
          <draw:frame draw:z-index="0" draw:style-name="gr1" draw:text-style-name="P1" svg:width="6.2996in" svg:height="3.5382in" svg:x="1.963in" svg:y="3.2in">
            <draw:object draw:notify-on-update-of-ranges="'Companion drone'.C3:'Companion drone'.C7 'Companion drone'.C1:'Companion drone'.C1 'Companion drone'.D3:'Companion drone'.D7 'Companion drone'.F3:'Companion drone'.F7 'Companion drone'.F1:'Companion drone'.F1 'Companion drone'.G3:'Companion drone'.G7 'Companion drone'.I3:'Companion drone'.I7 'Companion drone'.I1:'Companion drone'.I1 'Companion drone'.J3:'Companion drone'.J7 'Companion drone'.L3:'Companion drone'.L7 'Companion drone'.L1:'Companion drone'.L1 'Companion drone'.M3:'Companion drone'.M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96in" svg:height="3.5382in" svg:x="1.963in" svg:y="3.2in">
            <draw:object draw:notify-on-update-of-ranges="'Companion drone'.C3:'Companion drone'.C7 'Companion drone'.C1:'Companion drone'.C1 'Companion drone'.D3:'Companion drone'.D7 'Companion drone'.F3:'Companion drone'.F7 'Companion drone'.F1:'Companion drone'.F1 'Companion drone'.G3:'Companion drone'.G7 'Companion drone'.I3:'Companion drone'.I7 'Companion drone'.I1:'Companion drone'.I1 'Companion drone'.J3:'Companion drone'.J7 'Companion drone'.L3:'Companion drone'.L7 'Companion drone'.L1:'Companion drone'.L1 'Companion drone'.M3:'Companion drone'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cale factor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/>
          <table:table-cell table:number-columns-repeated="2" office:value-type="string" calcext:value-type="string">
            <text:p>Moved</text:p>
          </table:table-cell>
          <table:table-cell/>
          <table:table-cell table:number-columns-repeated="2" office:value-type="string" calcext:value-type="string">
            <text:p>Scaled</text:p>
          </table:table-cell>
          <table:table-cell/>
          <table:table-cell table:number-columns-repeated="2" office:value-type="string" calcext:value-type="string">
            <text:p>F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[.A11]*0.25" office:value-type="float" office:value="0.25" calcext:value-type="float">
            <text:p>0,25</text:p>
          </table:table-cell>
          <table:table-cell/>
          <table:table-cell table:number-columns-repeated="2" office:value-type="float" office:value="-0.6" calcext:value-type="float">
            <text:p>-0,6</text:p>
          </table:table-cell>
          <table:table-cell/>
          <table:table-cell table:formula="of:=[.C3]-[.C11]" office:value-type="float" office:value="-0.6" calcext:value-type="float">
            <text:p>-0,6</text:p>
          </table:table-cell>
          <table:table-cell table:formula="of:=[.D3]-[.D11]" office:value-type="float" office:value="-0.6" calcext:value-type="float">
            <text:p>-0,6</text:p>
          </table:table-cell>
          <table:table-cell/>
          <table:table-cell table:formula="of:=[.F3]*[.A3]" office:value-type="float" office:value="-0.15" calcext:value-type="float">
            <text:p>-0,15</text:p>
          </table:table-cell>
          <table:table-cell table:formula="of:=[.G3]*[.A3]" office:value-type="float" office:value="-0.15" calcext:value-type="float">
            <text:p>-0,15</text:p>
          </table:table-cell>
          <table:table-cell/>
          <table:table-cell table:formula="of:=[.I3]+[.C11]" office:value-type="float" office:value="-0.15" calcext:value-type="float">
            <text:p>-0,15</text:p>
          </table:table-cell>
          <table:table-cell table:formula="of:=[.J3]+[.D11]" office:value-type="float" office:value="-0.15" calcext:value-type="float">
            <text:p>-0,15</text:p>
          </table:table-cell>
        </table:table-row>
        <table:table-row table:style-name="ro1">
          <table:table-cell table:formula="of:=[.A3]" office:value-type="float" office:value="0.25" calcext:value-type="float">
            <text:p>0,2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-0.6" calcext:value-type="float">
            <text:p>-0,6</text:p>
          </table:table-cell>
          <table:table-cell/>
          <table:table-cell table:formula="of:=[.C4]-[.C12]" office:value-type="float" office:value="0.6" calcext:value-type="float">
            <text:p>0,6</text:p>
          </table:table-cell>
          <table:table-cell table:formula="of:=[.D4]-[.D12]" office:value-type="float" office:value="-0.6" calcext:value-type="float">
            <text:p>-0,6</text:p>
          </table:table-cell>
          <table:table-cell/>
          <table:table-cell table:formula="of:=[.F4]*[.A4]" office:value-type="float" office:value="0.15" calcext:value-type="float">
            <text:p>0,15</text:p>
          </table:table-cell>
          <table:table-cell table:formula="of:=[.G4]*[.A4]" office:value-type="float" office:value="-0.15" calcext:value-type="float">
            <text:p>-0,15</text:p>
          </table:table-cell>
          <table:table-cell/>
          <table:table-cell table:formula="of:=[.I4]+[.C12]" office:value-type="float" office:value="0.15" calcext:value-type="float">
            <text:p>0,15</text:p>
          </table:table-cell>
          <table:table-cell table:formula="of:=[.J4]+[.D12]" office:value-type="float" office:value="-0.15" calcext:value-type="float">
            <text:p>-0,15</text:p>
          </table:table-cell>
        </table:table-row>
        <table:table-row table:style-name="ro1">
          <table:table-cell table:formula="of:=[.A4]" office:value-type="float" office:value="0.25" calcext:value-type="float">
            <text:p>0,25</text:p>
          </table:table-cell>
          <table:table-cell/>
          <table:table-cell table:number-columns-repeated="2" office:value-type="float" office:value="0.6" calcext:value-type="float">
            <text:p>0,6</text:p>
          </table:table-cell>
          <table:table-cell/>
          <table:table-cell table:formula="of:=[.C5]-[.C13]" office:value-type="float" office:value="0.6" calcext:value-type="float">
            <text:p>0,6</text:p>
          </table:table-cell>
          <table:table-cell table:formula="of:=[.D5]-[.D13]" office:value-type="float" office:value="0.6" calcext:value-type="float">
            <text:p>0,6</text:p>
          </table:table-cell>
          <table:table-cell/>
          <table:table-cell table:formula="of:=[.F5]*[.A5]" office:value-type="float" office:value="0.15" calcext:value-type="float">
            <text:p>0,15</text:p>
          </table:table-cell>
          <table:table-cell table:formula="of:=[.G5]*[.A5]" office:value-type="float" office:value="0.15" calcext:value-type="float">
            <text:p>0,15</text:p>
          </table:table-cell>
          <table:table-cell/>
          <table:table-cell table:formula="of:=[.I5]+[.C13]" office:value-type="float" office:value="0.15" calcext:value-type="float">
            <text:p>0,15</text:p>
          </table:table-cell>
          <table:table-cell table:formula="of:=[.J5]+[.D13]" office:value-type="float" office:value="0.15" calcext:value-type="float">
            <text:p>0,15</text:p>
          </table:table-cell>
        </table:table-row>
        <table:table-row table:style-name="ro1">
          <table:table-cell table:formula="of:=[.A5]" office:value-type="float" office:value="0.25" calcext:value-type="float">
            <text:p>0,2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[.C6]-[.C14]" office:value-type="float" office:value="-0.6" calcext:value-type="float">
            <text:p>-0,6</text:p>
          </table:table-cell>
          <table:table-cell table:formula="of:=[.D6]-[.D14]" office:value-type="float" office:value="0.6" calcext:value-type="float">
            <text:p>0,6</text:p>
          </table:table-cell>
          <table:table-cell/>
          <table:table-cell table:formula="of:=[.F6]*[.A6]" office:value-type="float" office:value="-0.15" calcext:value-type="float">
            <text:p>-0,15</text:p>
          </table:table-cell>
          <table:table-cell table:formula="of:=[.G6]*[.A6]" office:value-type="float" office:value="0.15" calcext:value-type="float">
            <text:p>0,15</text:p>
          </table:table-cell>
          <table:table-cell/>
          <table:table-cell table:formula="of:=[.I6]+[.C14]" office:value-type="float" office:value="-0.15" calcext:value-type="float">
            <text:p>-0,15</text:p>
          </table:table-cell>
          <table:table-cell table:formula="of:=[.J6]+[.D14]" office:value-type="float" office:value="0.15" calcext:value-type="float">
            <text:p>0,15</text:p>
          </table:table-cell>
        </table:table-row>
        <table:table-row table:style-name="ro1">
          <table:table-cell table:formula="of:=[.A6]" office:value-type="float" office:value="0.25" calcext:value-type="float">
            <text:p>0,25</text:p>
          </table:table-cell>
          <table:table-cell/>
          <table:table-cell table:formula="of:=[.C3]" office:value-type="float" office:value="-0.6" calcext:value-type="float">
            <text:p>-0,6</text:p>
          </table:table-cell>
          <table:table-cell table:formula="of:=[.D3]" office:value-type="float" office:value="-0.6" calcext:value-type="float">
            <text:p>-0,6</text:p>
          </table:table-cell>
          <table:table-cell/>
          <table:table-cell table:formula="of:=[.C7]-[.C15]" office:value-type="float" office:value="-0.6" calcext:value-type="float">
            <text:p>-0,6</text:p>
          </table:table-cell>
          <table:table-cell table:formula="of:=[.D7]-[.D15]" office:value-type="float" office:value="-0.6" calcext:value-type="float">
            <text:p>-0,6</text:p>
          </table:table-cell>
          <table:table-cell/>
          <table:table-cell table:formula="of:=[.F7]*[.A7]" office:value-type="float" office:value="-0.15" calcext:value-type="float">
            <text:p>-0,15</text:p>
          </table:table-cell>
          <table:table-cell table:formula="of:=[.G7]*[.A7]" office:value-type="float" office:value="-0.15" calcext:value-type="float">
            <text:p>-0,15</text:p>
          </table:table-cell>
          <table:table-cell/>
          <table:table-cell table:formula="of:=[.I7]+[.C15]" office:value-type="float" office:value="-0.15" calcext:value-type="float">
            <text:p>-0,15</text:p>
          </table:table-cell>
          <table:table-cell table:formula="of:=[.J7]+[.D15]" office:value-type="float" office:value="-0.15" calcext:value-type="float">
            <text:p>-0,1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tomic scale factor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3]+([.C5]-[.C3])/2" office:value-type="float" office:value="0" calcext:value-type="float">
            <text:p>0</text:p>
          </table:table-cell>
          <table:table-cell table:formula="of:=[.D3]+([.D5]-[.D3])/2" office:value-type="float" office:value="0" calcext:value-type="float">
            <text:p>0</text:p>
          </table:table-cell>
          <table:table-cell table:formula="of:=IF([.A3]&gt;1;-1;1)" office:value-type="float" office:value="1" calcext:value-type="float">
            <text:p>1</text:p>
          </table:table-cell>
          <table:table-cell table:formula="of:=[.F3]+([.F5]-[.F3])/2" office:value-type="float" office:value="0" calcext:value-type="float">
            <text:p>0</text:p>
          </table:table-cell>
          <table:table-cell table:formula="of:=[.G3]+([.G5]-[.G3])/2" office:value-type="float" office:value="0" calcext:value-type="float">
            <text:p>0</text:p>
          </table:table-cell>
          <table:table-cell/>
          <table:table-cell table:formula="of:=[.I3]+([.I5]-[.I3])/2" office:value-type="float" office:value="0" calcext:value-type="float">
            <text:p>0</text:p>
          </table:table-cell>
          <table:table-cell table:formula="of:=[.J3]+([.J5]-[.J3])/2" office:value-type="float" office:value="0" calcext:value-type="float">
            <text:p>0</text:p>
          </table:table-cell>
          <table:table-cell table:formula="of:=[.E11]*-1" office:value-type="float" office:value="-1" calcext:value-type="float">
            <text:p>-1</text:p>
          </table:table-cell>
          <table:table-cell table:formula="of:=[.L3]+([.L5]-[.L3])/2" office:value-type="float" office:value="0" calcext:value-type="float">
            <text:p>0</text:p>
          </table:table-cell>
          <table:table-cell table:formula="of:=[.M3]+([.M5]-[.M3])/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1" calcext:value-type="float">
            <text:p>1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/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float" office:value="-1" calcext:value-type="float">
            <text:p>-1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/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float" office:value="-1" calcext:value-type="float">
            <text:p>-1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1" calcext:value-type="float">
            <text:p>1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/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-1" calcext:value-type="float">
            <text:p>-1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/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0" calcext:value-type="float">
            <text:p>0</text:p>
          </table:table-cell>
          <table:table-cell table:formula="of:=[.K14]" office:value-type="float" office:value="-1" calcext:value-type="float">
            <text:p>-1</text:p>
          </table:table-cell>
          <table:table-cell table:formula="of:=[.L14]" office:value-type="float" office:value="0" calcext:value-type="float">
            <text:p>0</text:p>
          </table:table-cell>
          <table:table-cell table:formula="of:=[.M14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2"/>
          <table:table-cell table:formula="of:=[.M11]-[.M5]" office:value-type="float" office:value="-0.15" calcext:value-type="float">
            <text:p>-0,15</text:p>
          </table:table-cell>
        </table:table-row>
        <table:table-row table:style-name="ro1">
          <table:table-cell table:number-columns-repeated="12"/>
          <table:table-cell table:formula="of:=[.M12]-[.M3]" office:value-type="float" office:value="0.15" calcext:value-type="float">
            <text:p>0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Schmidt</meta:initial-creator>
    <meta:creation-date>2023-01-27T11:42:58.132660409</meta:creation-date>
    <dc:date>2023-01-27T21:16:27.751094755</dc:date>
    <dc:creator>Andreas Schmidt</dc:creator>
    <meta:editing-duration>PT9H33M31S</meta:editing-duration>
    <meta:editing-cycles>1</meta:editing-cycles>
    <meta:document-statistic meta:table-count="3" meta:cell-count="410" meta:object-count="5"/>
    <meta:generator>LibreOffice/7.4.4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style-name="ch1">
        <chart:legend chart:legend-position="end" svg:x="13.494cm" svg:y="3.448cm" style:legend-expansion="high" chart:style-name="ch2"/>
        <chart:plot-area chart:style-name="ch3" table:cell-range-address="'Logistic robot'.C3:'Logistic robot'.D7 'Logistic robot'.C1:'Logistic robot'.C1 'Logistic robot'.F1:'Logistic robot'.F1 'Logistic robot'.G3:'Logistic robot'.G7 'Logistic robot'.I1:'Logistic robot'.I1 'Logistic robot'.J3:'Logistic robot'.J7 'Logistic robot'.L1:'Logistic robot'.L1 'Logistic robot'.M3:'Logistic robot'.M7" chart:data-source-has-labels="row" svg:x="0.32cm" svg:y="0.179cm" svg:width="12.854cm" svg:height="8.63cm">
          <chart:coordinate-region svg:x="0.611cm" svg:y="0.378cm" svg:width="12.323cm" svg:height="8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istic robot'.D3:'Logistic robot'.D7" chart:label-cell-address="'Logistic robot'.C1:'Logistic robot'.C1" chart:class="chart:scatter">
            <chart:domain table:cell-range-address="'Logistic robot'.C3:'Logistic robot'.C7"/>
            <chart:data-point chart:repeated="5"/>
          </chart:series>
          <chart:series chart:style-name="ch8" chart:values-cell-range-address="'Logistic robot'.G3:'Logistic robot'.G7" chart:label-cell-address="'Logistic robot'.F1:'Logistic robot'.F1" chart:class="chart:scatter">
            <chart:domain table:cell-range-address="'Logistic robot'.F3:'Logistic robot'.F7"/>
            <chart:data-point chart:repeated="5"/>
          </chart:series>
          <chart:series chart:style-name="ch9" chart:values-cell-range-address="'Logistic robot'.J3:'Logistic robot'.J7" chart:label-cell-address="'Logistic robot'.I1:'Logistic robot'.I1" chart:class="chart:scatter">
            <chart:domain table:cell-range-address="'Logistic robot'.I3:'Logistic robot'.I7"/>
            <chart:data-point chart:repeated="5"/>
          </chart:series>
          <chart:series chart:style-name="ch10" chart:values-cell-range-address="'Logistic robot'.M3:'Logistic robot'.M7" chart:label-cell-address="'Logistic robot'.L1:'Logistic robot'.L1" chart:class="chart:scatter">
            <chart:domain table:cell-range-address="'Logistic robot'.L3:'Logistic robot'.L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  <draw:g>
                  <svg:desc>'Logistic robot'.C1:'Logistic robot'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oved</text:p>
                <draw:g>
                  <svg:desc>'Logistic robot'.F1:'Logistic robot'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caled</text:p>
                <draw:g>
                  <svg:desc>'Logistic robot'.I1:'Logistic robot'.I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inal</text:p>
                <draw:g>
                  <svg:desc>'Logistic robot'.L1:'Logistic robot'.L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5">
                <text:p>-0.5</text:p>
                <draw:g>
                  <svg:desc>'Logistic robot'.C3:'Logistic robot'.C7</svg:desc>
                </draw:g>
              </table:table-cell>
              <table:table-cell office:value-type="float" office:value="-1.5">
                <text:p>-1.5</text:p>
                <draw:g>
                  <svg:desc>'Logistic robot'.D3:'Logistic robot'.D7</svg:desc>
                </draw:g>
              </table:table-cell>
              <table:table-cell office:value-type="float" office:value="-0.5">
                <text:p>-0.5</text:p>
                <draw:g>
                  <svg:desc>'Logistic robot'.F3:'Logistic robot'.F7</svg:desc>
                </draw:g>
              </table:table-cell>
              <table:table-cell office:value-type="float" office:value="-1">
                <text:p>-1</text:p>
                <draw:g>
                  <svg:desc>'Logistic robot'.G3:'Logistic robot'.G7</svg:desc>
                </draw:g>
              </table:table-cell>
              <table:table-cell office:value-type="float" office:value="-0.125">
                <text:p>-0.125</text:p>
                <draw:g>
                  <svg:desc>'Logistic robot'.I3:'Logistic robot'.I7</svg:desc>
                </draw:g>
              </table:table-cell>
              <table:table-cell office:value-type="float" office:value="-0.25">
                <text:p>-0.25</text:p>
                <draw:g>
                  <svg:desc>'Logistic robot'.J3:'Logistic robot'.J7</svg:desc>
                </draw:g>
              </table:table-cell>
              <table:table-cell office:value-type="float" office:value="-0.125">
                <text:p>-0.125</text:p>
                <draw:g>
                  <svg:desc>'Logistic robot'.L3:'Logistic robot'.L7</svg:desc>
                </draw:g>
              </table:table-cell>
              <table:table-cell office:value-type="float" office:value="-0.75">
                <text:p>-0.75</text:p>
                <draw:g>
                  <svg:desc>'Logistic robot'.M3:'Logistic robot'.M7</svg:desc>
                </draw:g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125">
                <text:p>0.125</text:p>
              </table:table-cell>
              <table:table-cell office:value-type="float" office:value="-0.25">
                <text:p>-0.25</text:p>
              </table:table-cell>
              <table:table-cell office:value-type="float" office:value="0.125">
                <text:p>0.12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  <table:table-cell office:value-type="float" office:value="-0.125">
                <text:p>-0.125</text:p>
              </table:table-cell>
              <table:table-cell office:value-type="float" office:value="0.25">
                <text:p>0.25</text:p>
              </table:table-cell>
              <table:table-cell office:value-type="float" office:value="-0.125">
                <text:p>-0.1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-1.5">
                <text:p>-1.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0.125">
                <text:p>-0.125</text:p>
              </table:table-cell>
              <table:table-cell office:value-type="float" office:value="-0.25">
                <text:p>-0.25</text:p>
              </table:table-cell>
              <table:table-cell office:value-type="float" office:value="-0.125">
                <text:p>-0.125</text:p>
              </table:table-cell>
              <table:table-cell office:value-type="float" office:value="-0.75">
                <text:p>-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style-name="ch1">
        <chart:legend chart:legend-position="end" svg:x="12.779cm" svg:y="3.199cm" style:legend-expansion="high" chart:style-name="ch2"/>
        <chart:plot-area chart:style-name="ch3" table:cell-range-address="'Atomic construction bot'.C3:'Atomic construction bot'.D7 'Atomic construction bot'.C1:'Atomic construction bot'.C1 'Atomic construction bot'.F1:'Atomic construction bot'.F1 'Atomic construction bot'.G3:'Atomic construction bot'.G7 'Atomic construction bot'.I1:'Atomic construction bot'.I1 'Atomic construction bot'.J3:'Atomic construction bot'.J7 'Atomic construction bot'.L1:'Atomic construction bot'.L1 'Atomic construction bot'.M3:'Atomic construction bot'.M7 'Atomic construction bot'.O1:'Atomic construction bot'.O1 'Atomic construction bot'.P3:'Atomic construction bot'.P7" chart:data-source-has-labels="row" svg:x="0.32cm" svg:y="0.179cm" svg:width="12.139cm" svg:height="8.63cm">
          <chart:coordinate-region svg:x="0.611cm" svg:y="0.378cm" svg:width="11.608cm" svg:height="8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tomic construction bot'.D3:'Atomic construction bot'.D7" chart:label-cell-address="'Atomic construction bot'.C1:'Atomic construction bot'.C1" chart:class="chart:scatter">
            <chart:domain table:cell-range-address="'Atomic construction bot'.C3:'Atomic construction bot'.C7"/>
            <chart:data-point chart:repeated="5"/>
          </chart:series>
          <chart:series chart:style-name="ch8" chart:values-cell-range-address="'Atomic construction bot'.G3:'Atomic construction bot'.G7" chart:label-cell-address="'Atomic construction bot'.F1:'Atomic construction bot'.F1" chart:class="chart:scatter">
            <chart:domain table:cell-range-address="'Atomic construction bot'.F3:'Atomic construction bot'.F7"/>
            <chart:data-point chart:repeated="5"/>
          </chart:series>
          <chart:series chart:style-name="ch9" chart:values-cell-range-address="'Atomic construction bot'.J3:'Atomic construction bot'.J7" chart:label-cell-address="'Atomic construction bot'.I1:'Atomic construction bot'.I1" chart:class="chart:scatter">
            <chart:domain table:cell-range-address="'Atomic construction bot'.I3:'Atomic construction bot'.I7"/>
            <chart:data-point chart:repeated="5"/>
          </chart:series>
          <chart:series chart:style-name="ch10" chart:values-cell-range-address="'Atomic construction bot'.M3:'Atomic construction bot'.M7" chart:label-cell-address="'Atomic construction bot'.L1:'Atomic construction bot'.L1" chart:class="chart:scatter">
            <chart:domain table:cell-range-address="'Atomic construction bot'.L3:'Atomic construction bot'.L7"/>
            <chart:data-point chart:repeated="5"/>
          </chart:series>
          <chart:series chart:style-name="ch11" chart:values-cell-range-address="'Atomic construction bot'.P3:'Atomic construction bot'.P7" chart:label-cell-address="'Atomic construction bot'.O1:'Atomic construction bot'.O1" chart:class="chart:scatter">
            <chart:domain table:cell-range-address="'Atomic construction bot'.O3:'Atomic construction bot'.O7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  <draw:g>
                  <svg:desc>'Atomic construction bot'.C1:'Atomic construction bot'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oved</text:p>
                <draw:g>
                  <svg:desc>'Atomic construction bot'.F1:'Atomic construction bot'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caled</text:p>
                <draw:g>
                  <svg:desc>'Atomic construction bot'.I1:'Atomic construction bot'.I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Moved back</text:p>
                <draw:g>
                  <svg:desc>'Atomic construction bot'.L1:'Atomic construction bot'.L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inal</text:p>
                <draw:g>
                  <svg:desc>'Atomic construction bot'.O1:'Atomic construction bot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'Atomic construction bot'.C3:'Atomic construction bot'.C7</svg:desc>
                </draw:g>
              </table:table-cell>
              <table:table-cell office:value-type="float" office:value="-1.5">
                <text:p>-1.5</text:p>
                <draw:g>
                  <svg:desc>'Atomic construction bot'.D3:'Atomic construction bot'.D7</svg:desc>
                </draw:g>
              </table:table-cell>
              <table:table-cell office:value-type="float" office:value="-0.5">
                <text:p>-0.5</text:p>
                <draw:g>
                  <svg:desc>'Atomic construction bot'.F3:'Atomic construction bot'.F7</svg:desc>
                </draw:g>
              </table:table-cell>
              <table:table-cell office:value-type="float" office:value="-0.5">
                <text:p>-0.5</text:p>
                <draw:g>
                  <svg:desc>'Atomic construction bot'.G3:'Atomic construction bot'.G7</svg:desc>
                </draw:g>
              </table:table-cell>
              <table:table-cell office:value-type="float" office:value="-0.0875">
                <text:p>-0.0875</text:p>
                <draw:g>
                  <svg:desc>'Atomic construction bot'.I3:'Atomic construction bot'.I7</svg:desc>
                </draw:g>
              </table:table-cell>
              <table:table-cell office:value-type="float" office:value="-0.0875">
                <text:p>-0.0875</text:p>
                <draw:g>
                  <svg:desc>'Atomic construction bot'.J3:'Atomic construction bot'.J7</svg:desc>
                </draw:g>
              </table:table-cell>
              <table:table-cell office:value-type="float" office:value="-0.0875">
                <text:p>-0.0875</text:p>
                <draw:g>
                  <svg:desc>'Atomic construction bot'.L3:'Atomic construction bot'.L7</svg:desc>
                </draw:g>
              </table:table-cell>
              <table:table-cell office:value-type="float" office:value="-1.0875">
                <text:p>-1.0875</text:p>
                <draw:g>
                  <svg:desc>'Atomic construction bot'.M3:'Atomic construction bot'.M7</svg:desc>
                </draw:g>
              </table:table-cell>
              <table:table-cell office:value-type="float" office:value="-0.0875">
                <text:p>-0.0875</text:p>
                <draw:g>
                  <svg:desc>'Atomic construction bot'.O3:'Atomic construction bot'.O7</svg:desc>
                </draw:g>
              </table:table-cell>
              <table:table-cell office:value-type="float" office:value="-0.675">
                <text:p>-0.675</text:p>
                <draw:g>
                  <svg:desc>'Atomic construction bot'.P3:'Atomic construction bot'.P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0.0875">
                <text:p>0.0875</text:p>
              </table:table-cell>
              <table:table-cell office:value-type="float" office:value="-0.0875">
                <text:p>-0.0875</text:p>
              </table:table-cell>
              <table:table-cell office:value-type="float" office:value="0.0875">
                <text:p>0.0875</text:p>
              </table:table-cell>
              <table:table-cell office:value-type="float" office:value="-1.0875">
                <text:p>-1.0875</text:p>
              </table:table-cell>
              <table:table-cell office:value-type="float" office:value="0.0875">
                <text:p>0.0875</text:p>
              </table:table-cell>
              <table:table-cell office:value-type="float" office:value="-0.675">
                <text:p>-0.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875">
                <text:p>0.0875</text:p>
              </table:table-cell>
              <table:table-cell office:value-type="float" office:value="0.0875">
                <text:p>0.0875</text:p>
              </table:table-cell>
              <table:table-cell office:value-type="float" office:value="0.0875">
                <text:p>0.0875</text:p>
              </table:table-cell>
              <table:table-cell office:value-type="float" office:value="-0.9125">
                <text:p>-0.9125</text:p>
              </table:table-cell>
              <table:table-cell office:value-type="float" office:value="0.0875">
                <text:p>0.08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-0.0875">
                <text:p>-0.0875</text:p>
              </table:table-cell>
              <table:table-cell office:value-type="float" office:value="0.0875">
                <text:p>0.0875</text:p>
              </table:table-cell>
              <table:table-cell office:value-type="float" office:value="-0.0875">
                <text:p>-0.0875</text:p>
              </table:table-cell>
              <table:table-cell office:value-type="float" office:value="-0.9125">
                <text:p>-0.9125</text:p>
              </table:table-cell>
              <table:table-cell office:value-type="float" office:value="-0.0875">
                <text:p>-0.08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-1.5">
                <text:p>-1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0.0875">
                <text:p>-0.0875</text:p>
              </table:table-cell>
              <table:table-cell office:value-type="float" office:value="-0.0875">
                <text:p>-0.0875</text:p>
              </table:table-cell>
              <table:table-cell office:value-type="float" office:value="-0.0875">
                <text:p>-0.0875</text:p>
              </table:table-cell>
              <table:table-cell office:value-type="float" office:value="-1.0875">
                <text:p>-1.0875</text:p>
              </table:table-cell>
              <table:table-cell office:value-type="float" office:value="-0.0875">
                <text:p>-0.0875</text:p>
              </table:table-cell>
              <table:table-cell office:value-type="float" office:value="-0.675">
                <text:p>-0.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style-name="ch1">
        <chart:legend chart:legend-position="end" svg:x="13.494cm" svg:y="3.448cm" style:legend-expansion="high" chart:style-name="ch2"/>
        <chart:plot-area chart:style-name="ch3" table:cell-range-address="'Logistic robot'.C3:'Logistic robot'.D7 'Logistic robot'.C1:'Logistic robot'.C1 'Logistic robot'.F1:'Logistic robot'.F1 'Logistic robot'.G3:'Logistic robot'.G7 'Logistic robot'.I1:'Logistic robot'.I1 'Logistic robot'.J3:'Logistic robot'.J7 'Logistic robot'.L1:'Logistic robot'.L1 'Logistic robot'.M3:'Logistic robot'.M7" chart:data-source-has-labels="row" svg:x="0.32cm" svg:y="0.179cm" svg:width="12.854cm" svg:height="8.63cm">
          <chart:coordinate-region svg:x="0.611cm" svg:y="0.378cm" svg:width="12.323cm" svg:height="8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istic robot'.D3:'Logistic robot'.D7" chart:label-cell-address="'Logistic robot'.C1:'Logistic robot'.C1" chart:class="chart:scatter">
            <chart:domain table:cell-range-address="'Logistic robot'.C3:'Logistic robot'.C7"/>
            <chart:data-point chart:repeated="5"/>
          </chart:series>
          <chart:series chart:style-name="ch8" chart:values-cell-range-address="'Logistic robot'.G3:'Logistic robot'.G7" chart:label-cell-address="'Logistic robot'.F1:'Logistic robot'.F1" chart:class="chart:scatter">
            <chart:domain table:cell-range-address="'Logistic robot'.F3:'Logistic robot'.F7"/>
            <chart:data-point chart:repeated="5"/>
          </chart:series>
          <chart:series chart:style-name="ch9" chart:values-cell-range-address="'Logistic robot'.J3:'Logistic robot'.J7" chart:label-cell-address="'Logistic robot'.I1:'Logistic robot'.I1" chart:class="chart:scatter">
            <chart:domain table:cell-range-address="'Logistic robot'.I3:'Logistic robot'.I7"/>
            <chart:data-point chart:repeated="5"/>
          </chart:series>
          <chart:series chart:style-name="ch10" chart:values-cell-range-address="'Logistic robot'.M3:'Logistic robot'.M7" chart:label-cell-address="'Logistic robot'.L1:'Logistic robot'.L1" chart:class="chart:scatter">
            <chart:domain table:cell-range-address="'Logistic robot'.L3:'Logistic robot'.L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  <draw:g>
                  <svg:desc>'Logistic robot'.C1:'Logistic robot'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oved</text:p>
                <draw:g>
                  <svg:desc>'Logistic robot'.F1:'Logistic robot'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caled</text:p>
                <draw:g>
                  <svg:desc>'Logistic robot'.I1:'Logistic robot'.I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inal</text:p>
                <draw:g>
                  <svg:desc>'Logistic robot'.L1:'Logistic robot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'Logistic robot'.C3:'Logistic robot'.C7</svg:desc>
                </draw:g>
              </table:table-cell>
              <table:table-cell office:value-type="float" office:value="-1.5">
                <text:p>-1.5</text:p>
                <draw:g>
                  <svg:desc>'Logistic robot'.D3:'Logistic robot'.D7</svg:desc>
                </draw:g>
              </table:table-cell>
              <table:table-cell office:value-type="float" office:value="-0.5">
                <text:p>-0.5</text:p>
                <draw:g>
                  <svg:desc>'Logistic robot'.F3:'Logistic robot'.F7</svg:desc>
                </draw:g>
              </table:table-cell>
              <table:table-cell office:value-type="float" office:value="-1">
                <text:p>-1</text:p>
                <draw:g>
                  <svg:desc>'Logistic robot'.G3:'Logistic robot'.G7</svg:desc>
                </draw:g>
              </table:table-cell>
              <table:table-cell office:value-type="float" office:value="-0.125">
                <text:p>-0.125</text:p>
                <draw:g>
                  <svg:desc>'Logistic robot'.I3:'Logistic robot'.I7</svg:desc>
                </draw:g>
              </table:table-cell>
              <table:table-cell office:value-type="float" office:value="-0.25">
                <text:p>-0.25</text:p>
                <draw:g>
                  <svg:desc>'Logistic robot'.J3:'Logistic robot'.J7</svg:desc>
                </draw:g>
              </table:table-cell>
              <table:table-cell office:value-type="float" office:value="-0.125">
                <text:p>-0.125</text:p>
                <draw:g>
                  <svg:desc>'Logistic robot'.L3:'Logistic robot'.L7</svg:desc>
                </draw:g>
              </table:table-cell>
              <table:table-cell office:value-type="float" office:value="-0.75">
                <text:p>-0.75</text:p>
                <draw:g>
                  <svg:desc>'Logistic robot'.M3:'Logistic robot'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125">
                <text:p>0.125</text:p>
              </table:table-cell>
              <table:table-cell office:value-type="float" office:value="-0.25">
                <text:p>-0.25</text:p>
              </table:table-cell>
              <table:table-cell office:value-type="float" office:value="0.125">
                <text:p>0.12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  <table:table-cell office:value-type="float" office:value="-0.125">
                <text:p>-0.125</text:p>
              </table:table-cell>
              <table:table-cell office:value-type="float" office:value="0.25">
                <text:p>0.25</text:p>
              </table:table-cell>
              <table:table-cell office:value-type="float" office:value="-0.125">
                <text:p>-0.1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-1.5">
                <text:p>-1.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0.125">
                <text:p>-0.125</text:p>
              </table:table-cell>
              <table:table-cell office:value-type="float" office:value="-0.25">
                <text:p>-0.25</text:p>
              </table:table-cell>
              <table:table-cell office:value-type="float" office:value="-0.125">
                <text:p>-0.125</text:p>
              </table:table-cell>
              <table:table-cell office:value-type="float" office:value="-0.75">
                <text:p>-0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style-name="ch1">
        <chart:legend chart:legend-position="end" svg:x="13.494cm" svg:y="3.448cm" style:legend-expansion="high" chart:style-name="ch2"/>
        <chart:plot-area chart:style-name="ch3" table:cell-range-address="'Companion drone'.C3:'Companion drone'.D7 'Companion drone'.C1:'Companion drone'.C1 'Companion drone'.F1:'Companion drone'.F1 'Companion drone'.G3:'Companion drone'.G7 'Companion drone'.I1:'Companion drone'.I1 'Companion drone'.J3:'Companion drone'.J7 'Companion drone'.L1:'Companion drone'.L1 'Companion drone'.M3:'Companion drone'.M7" chart:data-source-has-labels="row" svg:x="0.32cm" svg:y="0.179cm" svg:width="12.854cm" svg:height="8.63cm">
          <chart:coordinate-region svg:x="0.611cm" svg:y="0.378cm" svg:width="12.323cm" svg:height="8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anion drone'.D3:'Companion drone'.D7" chart:label-cell-address="'Companion drone'.C1:'Companion drone'.C1" chart:class="chart:scatter">
            <chart:domain table:cell-range-address="'Companion drone'.C3:'Companion drone'.C7"/>
            <chart:data-point chart:repeated="5"/>
          </chart:series>
          <chart:series chart:style-name="ch8" chart:values-cell-range-address="'Companion drone'.G3:'Companion drone'.G7" chart:label-cell-address="'Companion drone'.F1:'Companion drone'.F1" chart:class="chart:scatter">
            <chart:domain table:cell-range-address="'Companion drone'.F3:'Companion drone'.F7"/>
            <chart:data-point chart:repeated="5"/>
          </chart:series>
          <chart:series chart:style-name="ch9" chart:values-cell-range-address="'Companion drone'.J3:'Companion drone'.J7" chart:label-cell-address="'Companion drone'.I1:'Companion drone'.I1" chart:class="chart:scatter">
            <chart:domain table:cell-range-address="'Companion drone'.I3:'Companion drone'.I7"/>
            <chart:data-point chart:repeated="5"/>
          </chart:series>
          <chart:series chart:style-name="ch10" chart:values-cell-range-address="'Companion drone'.M3:'Companion drone'.M7" chart:label-cell-address="'Companion drone'.L1:'Companion drone'.L1" chart:class="chart:scatter">
            <chart:domain table:cell-range-address="'Companion drone'.L3:'Companion drone'.L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  <draw:g>
                  <svg:desc>'Companion drone'.C1:'Companion drone'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oved</text:p>
                <draw:g>
                  <svg:desc>'Companion drone'.F1:'Companion drone'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caled</text:p>
                <draw:g>
                  <svg:desc>'Companion drone'.I1:'Companion drone'.I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inal</text:p>
                <draw:g>
                  <svg:desc>'Companion drone'.L1:'Companion dron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">
                <text:p>-0.6</text:p>
                <draw:g>
                  <svg:desc>'Companion drone'.C3:'Companion drone'.C7</svg:desc>
                </draw:g>
              </table:table-cell>
              <table:table-cell office:value-type="float" office:value="-0.6">
                <text:p>-0.6</text:p>
                <draw:g>
                  <svg:desc>'Companion drone'.D3:'Companion drone'.D7</svg:desc>
                </draw:g>
              </table:table-cell>
              <table:table-cell office:value-type="float" office:value="-0.6">
                <text:p>-0.6</text:p>
                <draw:g>
                  <svg:desc>'Companion drone'.F3:'Companion drone'.F7</svg:desc>
                </draw:g>
              </table:table-cell>
              <table:table-cell office:value-type="float" office:value="-0.6">
                <text:p>-0.6</text:p>
                <draw:g>
                  <svg:desc>'Companion drone'.G3:'Companion drone'.G7</svg:desc>
                </draw:g>
              </table:table-cell>
              <table:table-cell office:value-type="float" office:value="-0.15">
                <text:p>-0.15</text:p>
                <draw:g>
                  <svg:desc>'Companion drone'.I3:'Companion drone'.I7</svg:desc>
                </draw:g>
              </table:table-cell>
              <table:table-cell office:value-type="float" office:value="-0.15">
                <text:p>-0.15</text:p>
                <draw:g>
                  <svg:desc>'Companion drone'.J3:'Companion drone'.J7</svg:desc>
                </draw:g>
              </table:table-cell>
              <table:table-cell office:value-type="float" office:value="-0.15">
                <text:p>-0.15</text:p>
                <draw:g>
                  <svg:desc>'Companion drone'.L3:'Companion drone'.L7</svg:desc>
                </draw:g>
              </table:table-cell>
              <table:table-cell office:value-type="float" office:value="-0.15">
                <text:p>-0.15</text:p>
                <draw:g>
                  <svg:desc>'Companion drone'.M3:'Companion drone'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-0.6">
                <text:p>-0.6</text:p>
              </table:table-cell>
              <table:table-cell office:value-type="float" office:value="0.6">
                <text:p>0.6</text:p>
              </table:table-cell>
              <table:table-cell office:value-type="float" office:value="-0.6">
                <text:p>-0.6</text:p>
              </table:table-cell>
              <table:table-cell office:value-type="float" office:value="0.15">
                <text:p>0.15</text:p>
              </table:table-cell>
              <table:table-cell office:value-type="float" office:value="-0.15">
                <text:p>-0.15</text:p>
              </table:table-cell>
              <table:table-cell office:value-type="float" office:value="0.15">
                <text:p>0.1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">
                <text:p>-0.6</text:p>
              </table:table-cell>
              <table:table-cell office:value-type="float" office:value="0.6">
                <text:p>0.6</text:p>
              </table:table-cell>
              <table:table-cell office:value-type="float" office:value="-0.6">
                <text:p>-0.6</text:p>
              </table:table-cell>
              <table:table-cell office:value-type="float" office:value="0.6">
                <text:p>0.6</text:p>
              </table:table-cell>
              <table:table-cell office:value-type="float" office:value="-0.15">
                <text:p>-0.15</text:p>
              </table:table-cell>
              <table:table-cell office:value-type="float" office:value="0.15">
                <text:p>0.15</text:p>
              </table:table-cell>
              <table:table-cell office:value-type="float" office:value="-0.15">
                <text:p>-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  <table:table-cell office:value-type="float" office:value="-0.15">
                <text:p>-0.15</text:p>
              </table:table-cell>
              <table:table-cell office:value-type="float" office:value="-0.15">
                <text:p>-0.15</text:p>
              </table:table-cell>
              <table:table-cell office:value-type="float" office:value="-0.15">
                <text:p>-0.15</text:p>
              </table:table-cell>
              <table:table-cell office:value-type="float" office:value="-0.15">
                <text:p>-0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style-name="ch1">
        <chart:legend chart:legend-position="end" svg:x="13.494cm" svg:y="3.448cm" style:legend-expansion="high" chart:style-name="ch2"/>
        <chart:plot-area chart:style-name="ch3" table:cell-range-address="'Companion drone'.C3:'Companion drone'.D7 'Companion drone'.C1:'Companion drone'.C1 'Companion drone'.F1:'Companion drone'.F1 'Companion drone'.G3:'Companion drone'.G7 'Companion drone'.I1:'Companion drone'.I1 'Companion drone'.J3:'Companion drone'.J7 'Companion drone'.L1:'Companion drone'.L1 'Companion drone'.M3:'Companion drone'.M7" chart:data-source-has-labels="row" svg:x="0.32cm" svg:y="0.179cm" svg:width="12.854cm" svg:height="8.63cm">
          <chart:coordinate-region svg:x="0.611cm" svg:y="0.378cm" svg:width="12.323cm" svg:height="8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anion drone'.D3:'Companion drone'.D7" chart:label-cell-address="'Companion drone'.C1:'Companion drone'.C1" chart:class="chart:scatter">
            <chart:domain table:cell-range-address="'Companion drone'.C3:'Companion drone'.C7"/>
            <chart:data-point chart:repeated="5"/>
          </chart:series>
          <chart:series chart:style-name="ch8" chart:values-cell-range-address="'Companion drone'.G3:'Companion drone'.G7" chart:label-cell-address="'Companion drone'.F1:'Companion drone'.F1" chart:class="chart:scatter">
            <chart:domain table:cell-range-address="'Companion drone'.F3:'Companion drone'.F7"/>
            <chart:data-point chart:repeated="5"/>
          </chart:series>
          <chart:series chart:style-name="ch9" chart:values-cell-range-address="'Companion drone'.J3:'Companion drone'.J7" chart:label-cell-address="'Companion drone'.I1:'Companion drone'.I1" chart:class="chart:scatter">
            <chart:domain table:cell-range-address="'Companion drone'.I3:'Companion drone'.I7"/>
            <chart:data-point chart:repeated="5"/>
          </chart:series>
          <chart:series chart:style-name="ch10" chart:values-cell-range-address="'Companion drone'.M3:'Companion drone'.M7" chart:label-cell-address="'Companion drone'.L1:'Companion drone'.L1" chart:class="chart:scatter">
            <chart:domain table:cell-range-address="'Companion drone'.L3:'Companion drone'.L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  <draw:g>
                  <svg:desc>'Companion drone'.C1:'Companion drone'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oved</text:p>
                <draw:g>
                  <svg:desc>'Companion drone'.F1:'Companion drone'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caled</text:p>
                <draw:g>
                  <svg:desc>'Companion drone'.I1:'Companion drone'.I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inal</text:p>
                <draw:g>
                  <svg:desc>'Companion drone'.L1:'Companion dron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">
                <text:p>-0.6</text:p>
                <draw:g>
                  <svg:desc>'Companion drone'.C3:'Companion drone'.C7</svg:desc>
                </draw:g>
              </table:table-cell>
              <table:table-cell office:value-type="float" office:value="-0.6">
                <text:p>-0.6</text:p>
                <draw:g>
                  <svg:desc>'Companion drone'.D3:'Companion drone'.D7</svg:desc>
                </draw:g>
              </table:table-cell>
              <table:table-cell office:value-type="float" office:value="-0.6">
                <text:p>-0.6</text:p>
                <draw:g>
                  <svg:desc>'Companion drone'.F3:'Companion drone'.F7</svg:desc>
                </draw:g>
              </table:table-cell>
              <table:table-cell office:value-type="float" office:value="-0.6">
                <text:p>-0.6</text:p>
                <draw:g>
                  <svg:desc>'Companion drone'.G3:'Companion drone'.G7</svg:desc>
                </draw:g>
              </table:table-cell>
              <table:table-cell office:value-type="float" office:value="-0.15">
                <text:p>-0.15</text:p>
                <draw:g>
                  <svg:desc>'Companion drone'.I3:'Companion drone'.I7</svg:desc>
                </draw:g>
              </table:table-cell>
              <table:table-cell office:value-type="float" office:value="-0.15">
                <text:p>-0.15</text:p>
                <draw:g>
                  <svg:desc>'Companion drone'.J3:'Companion drone'.J7</svg:desc>
                </draw:g>
              </table:table-cell>
              <table:table-cell office:value-type="float" office:value="-0.15">
                <text:p>-0.15</text:p>
                <draw:g>
                  <svg:desc>'Companion drone'.L3:'Companion drone'.L7</svg:desc>
                </draw:g>
              </table:table-cell>
              <table:table-cell office:value-type="float" office:value="-0.15">
                <text:p>-0.15</text:p>
                <draw:g>
                  <svg:desc>'Companion drone'.M3:'Companion drone'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-0.6">
                <text:p>-0.6</text:p>
              </table:table-cell>
              <table:table-cell office:value-type="float" office:value="0.6">
                <text:p>0.6</text:p>
              </table:table-cell>
              <table:table-cell office:value-type="float" office:value="-0.6">
                <text:p>-0.6</text:p>
              </table:table-cell>
              <table:table-cell office:value-type="float" office:value="0.15">
                <text:p>0.15</text:p>
              </table:table-cell>
              <table:table-cell office:value-type="float" office:value="-0.15">
                <text:p>-0.15</text:p>
              </table:table-cell>
              <table:table-cell office:value-type="float" office:value="0.15">
                <text:p>0.1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">
                <text:p>-0.6</text:p>
              </table:table-cell>
              <table:table-cell office:value-type="float" office:value="0.6">
                <text:p>0.6</text:p>
              </table:table-cell>
              <table:table-cell office:value-type="float" office:value="-0.6">
                <text:p>-0.6</text:p>
              </table:table-cell>
              <table:table-cell office:value-type="float" office:value="0.6">
                <text:p>0.6</text:p>
              </table:table-cell>
              <table:table-cell office:value-type="float" office:value="-0.15">
                <text:p>-0.15</text:p>
              </table:table-cell>
              <table:table-cell office:value-type="float" office:value="0.15">
                <text:p>0.15</text:p>
              </table:table-cell>
              <table:table-cell office:value-type="float" office:value="-0.15">
                <text:p>-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  <table:table-cell office:value-type="float" office:value="-0.15">
                <text:p>-0.15</text:p>
              </table:table-cell>
              <table:table-cell office:value-type="float" office:value="-0.15">
                <text:p>-0.15</text:p>
              </table:table-cell>
              <table:table-cell office:value-type="float" office:value="-0.15">
                <text:p>-0.15</text:p>
              </table:table-cell>
              <table:table-cell office:value-type="float" office:value="-0.15">
                <text:p>-0.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